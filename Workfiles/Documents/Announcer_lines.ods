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fo:wrap-option="wrap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middle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middle" fo:wrap-option="wrap" fo:background-color="#C0E6F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wrap-option="wrap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2.64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poken lines</text:p>
          </table:table-cell>
          <table:table-cell office:value-type="string" table:style-name="ce3">
            <text:p>File Names</text:p>
          </table:table-cell>
          <table:table-cell table:number-columns-repeated="2"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table:number-columns-repeated="3" table:style-name="ce8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9">
            <text:p>"Free For All"<text:s/></text:p>
          </table:table-cell>
          <table:table-cell office:value-type="string" table:style-name="ce8">
            <text:p>SW_A_Anouncername_GMN_FFA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Team Death Match"</text:p>
          </table:table-cell>
          <table:table-cell office:value-type="string" table:style-name="ce8">
            <text:p>SW_A_Anouncername_GMN_TDM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apture The flag"</text:p>
          </table:table-cell>
          <table:table-cell office:value-type="string" table:style-name="ce8">
            <text:p>SW_A_Anouncername_GMN_CTF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orruption"</text:p>
          </table:table-cell>
          <table:table-cell office:value-type="string" table:style-name="ce8">
            <text:p>SW_A_Anouncername_GMN_COR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VIP"</text:p>
          </table:table-cell>
          <table:table-cell office:value-type="string" table:style-name="ce8">
            <text:p>SW_A_Anouncername_GMN_VIP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King Of The Hill"</text:p>
          </table:table-cell>
          <table:table-cell office:value-type="string" table:style-name="ce8">
            <text:p>SW_A_Anouncername_GMN_KOH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Assault"</text:p>
          </table:table-cell>
          <table:table-cell office:value-type="string" table:style-name="ce8">
            <text:p>SW_A_Anouncername_GMN_ASS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Juggernaut”</text:p>
          </table:table-cell>
          <table:table-cell office:value-type="string" table:style-name="ce8">
            <text:p>SW_A_Anouncername_GMN_JUG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Arena”</text:p>
          </table:table-cell>
          <table:table-cell office:value-type="string" table:style-name="ce8">
            <text:p>SW_A_Anouncername_GMN_ARE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Extraction”</text:p>
          </table:table-cell>
          <table:table-cell office:value-type="string" table:style-name="ce8">
            <text:p>SW_A_Anouncername_GMN_EXT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bjective"</text:p>
          </table:table-cell>
          <table:table-cell office:value-type="string" table:style-name="ce8">
            <text:p>SW_A_Anouncername_GMN_OBJ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ddball"</text:p>
          </table:table-cell>
          <table:table-cell office:value-type="string" table:style-name="ce8">
            <text:p>SW_A_Anouncername_GMN_ODD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Fiesta"</text:p>
          </table:table-cell>
          <table:table-cell office:value-type="string" table:style-name="ce8">
            <text:p>SW_A_Anouncername_GMN_FIE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table:style-name="ce10"/>
          <table:table-cell table:style-name="ce8"/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11">
            <text:p>"Score!"</text:p>
          </table:table-cell>
          <table:table-cell office:value-type="string" table:style-name="ce8">
            <text:p>SW_A_Anouncername_GME_SC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ctory!"</text:p>
          </table:table-cell>
          <table:table-cell office:value-type="string" table:style-name="ce8">
            <text:p>SW_A_Anouncername_GME_VIC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Defeat"</text:p>
          </table:table-cell>
          <table:table-cell office:value-type="string" table:style-name="ce8">
            <text:p>SW_A_Anouncername_GME_DEF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Game over"</text:p>
          </table:table-cell>
          <table:table-cell office:value-type="string" table:style-name="ce8">
            <text:p>SW_A_Anouncername_GME_GA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Round over"</text:p>
          </table:table-cell>
          <table:table-cell office:value-type="string" table:style-name="ce8">
            <text:p>SW_A_Anouncername_GME_ROV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New round"</text:p>
          </table:table-cell>
          <table:table-cell office:value-type="string" table:style-name="ce8">
            <text:p>SW_A_Anouncername_GME_NER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Corruption Wins"</text:p>
          </table:table-cell>
          <table:table-cell office:value-type="string" table:style-name="ce8">
            <text:p>SW_A_Anouncername_GME_CO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Survivors win"</text:p>
          </table:table-cell>
          <table:table-cell office:value-type="string" table:style-name="ce8">
            <text:p>SW_A_Anouncername_GME_SU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P eliminated"</text:p>
          </table:table-cell>
          <table:table-cell office:value-type="string" table:style-name="ce8">
            <text:p>SW_A_Anouncername_GME_VIPE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VIP secured"</text:p>
          </table:table-cell>
          <table:table-cell office:value-type="string" table:style-name="ce8">
            <text:p>SW_A_Anouncername_GME_VIPS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1 minute remaining "</text:p>
          </table:table-cell>
          <table:table-cell office:value-type="string" table:style-name="ce8">
            <text:p>SW_A_Anouncername_GME_1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30 seconds remaining"</text:p>
          </table:table-cell>
          <table:table-cell office:value-type="string" table:style-name="ce8">
            <text:p>SW_A_Anouncername_GME_3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10 seconds remaining"</text:p>
          </table:table-cell>
          <table:table-cell office:value-type="string" table:style-name="ce8">
            <text:p>SW_A_Anouncername_GME_1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Enemy team has scored"</text:p>
          </table:table-cell>
          <table:table-cell office:value-type="string" table:style-name="ce8">
            <text:p>SW_A_Anouncername_GME_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droped"</text:p>
          </table:table-cell>
          <table:table-cell office:value-type="string" table:style-name="ce8">
            <text:p>SW_A_Anouncername_GME_OBJ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moved"</text:p>
          </table:table-cell>
          <table:table-cell office:value-type="string" table:style-name="ce8">
            <text:p>SW_A_Anouncername_GME_OBJ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contested"</text:p>
          </table:table-cell>
          <table:table-cell office:value-type="string" table:style-name="ce8">
            <text:p>SW_A_Anouncername_GME_OBJC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lost"</text:p>
          </table:table-cell>
          <table:table-cell office:value-type="string" table:style-name="ce8">
            <text:p>SW_A_Anouncername_GME_OBJL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disabled"</text:p>
          </table:table-cell>
          <table:table-cell office:value-type="string" table:style-name="ce8">
            <text:p>SW_A_Anouncername_GME_OBJDI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armed"</text:p>
          </table:table-cell>
          <table:table-cell office:value-type="string" table:style-name="ce8">
            <text:p>SW_A_Anouncername_GME_OBJA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Objective destroyed"</text:p>
          </table:table-cell>
          <table:table-cell office:value-type="string" table:style-name="ce8">
            <text:p>SW_A_Anouncername_GME_OBJD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Next phase"</text:p>
          </table:table-cell>
          <table:table-cell office:value-type="string" table:style-name="ce8">
            <text:p>SW_A_Anouncername_GME_NP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Zone moved"</text:p>
          </table:table-cell>
          <table:table-cell office:value-type="string" table:style-name="ce8">
            <text:p>SW_A_Anouncername_GME_Z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"First Blood"</text:p>
          </table:table-cell>
          <table:table-cell office:value-type="string" table:style-name="ce8">
            <text:p>SW_A_Anouncername_Kill_FB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uble kill"</text:p>
          </table:table-cell>
          <table:table-cell office:value-type="string" table:style-name="ce8">
            <text:p>SW_A_Anouncername_Kill_D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Tripple kill"</text:p>
          </table:table-cell>
          <table:table-cell office:value-type="string" table:style-name="ce8">
            <text:p>SW_A_Anouncername_Kill_T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Over kill"</text:p>
          </table:table-cell>
          <table:table-cell office:value-type="string" table:style-name="ce8">
            <text:p>SW_A_Anouncername_Kill_O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Kill Frenzy"</text:p>
          </table:table-cell>
          <table:table-cell office:value-type="string" table:style-name="ce8">
            <text:p>SW_A_Anouncername_Kill_KF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Unstoppable"</text:p>
          </table:table-cell>
          <table:table-cell office:value-type="string" table:style-name="ce8">
            <text:p>SW_A_Anouncername_Kill_US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ethroned"</text:p>
          </table:table-cell>
          <table:table-cell office:value-type="string" table:style-name="ce8">
            <text:p>SW_A_Anouncername_Kill_DTN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Revenge"</text:p>
          </table:table-cell>
          <table:table-cell office:value-type="string" table:style-name="ce8">
            <text:p>SW_A_Anouncername_Kill_REV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mination"</text:p>
          </table:table-cell>
          <table:table-cell office:value-type="string" table:style-name="ce8">
            <text:p>SW_A_Anouncername_Kill_DO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"Eliminate the enemy team to score"</text:p>
          </table:table-cell>
          <table:table-cell office:value-type="string" table:style-name="ce8">
            <text:p>SW_A_Anouncername_TIP_FF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enemy flag to score"</text:p>
          </table:table-cell>
          <table:table-cell office:value-type="string" table:style-name="ce8">
            <text:p>SW_A_Anouncername_TIP_CT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ontrol zones to score"</text:p>
          </table:table-cell>
          <table:table-cell office:value-type="string" table:style-name="ce8">
            <text:p>SW_A_Anouncername_TIP_KOTH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Protect the VIP"</text:p>
          </table:table-cell>
          <table:table-cell office:value-type="string" table:style-name="ce8">
            <text:p>SW_A_Anouncername_TIP_VIP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the VIP"</text:p>
          </table:table-cell>
          <table:table-cell office:value-type="string" table:style-name="ce8">
            <text:p>SW_A_Anouncername_TIP_VIP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Survive the Corruption"</text:p>
          </table:table-cell>
          <table:table-cell office:value-type="string" table:style-name="ce8">
            <text:p>SW_A_Anouncername_TIP_CORS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survivors to score"</text:p>
          </table:table-cell>
          <table:table-cell office:value-type="string" table:style-name="ce8">
            <text:p>SW_A_Anouncername_TIP_COR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liver the bomb to the enemy base"</text:p>
          </table:table-cell>
          <table:table-cell office:value-type="string" table:style-name="ce8">
            <text:p>SW_A_Anouncername_TIP_ASS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your base"</text:p>
          </table:table-cell>
          <table:table-cell office:value-type="string" table:style-name="ce8">
            <text:p>SW_A_Anouncername_TIP_ASS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mplete the objective to score</text:p>
          </table:table-cell>
          <table:table-cell office:value-type="string" table:style-name="ce8">
            <text:p>SW_A_Anouncername_TIP_OBJ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“Etract cores to score”</text:p>
          </table:table-cell>
          <table:table-cell office:value-type="string" table:style-name="ce8">
            <text:p>SW_A_Anouncername_TIP_EXT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objective to score"</text:p>
          </table:table-cell>
          <table:table-cell office:value-type="string" table:style-name="ce8">
            <text:p>SW_A_Anouncername_TIP_OBJC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the objective to score"</text:p>
          </table:table-cell>
          <table:table-cell office:value-type="string" table:style-name="ce8">
            <text:p>SW_A_Anouncername_TIP_OBJ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Arm the obejctive to score"</text:p>
          </table:table-cell>
          <table:table-cell office:value-type="string" table:style-name="ce8">
            <text:p>SW_A_Anouncername_TIP_OBJA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8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8"/>
          <table:table-cell table:number-columns-repeated="16382"/>
        </table:table-row>
        <table:table-row table:number-rows-repeated="3" table:style-name="ro1">
          <table:table-cell table:number-columns-repeated="2" table:style-name="ce8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JEAN C CONCEPCION CRUZ</dc:creator>
    <meta:creation-date>2022-07-21T11:21:07Z</meta:creation-date>
    <dc:date>2026-03-24T01:02:01Z</dc:date>
    <meta:print-date>2026-03-24T00:48:48Z</meta:print-date>
    <meta:editing-cycles>2</meta:editing-cycles>
    <meta:editing-duration>PT688S</meta:editing-duration>
  </office:meta>
</office:document-meta>
</file>